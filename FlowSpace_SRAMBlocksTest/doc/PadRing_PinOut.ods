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600000196A2AFEE6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4.1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color="#c9211e" style:text-line-through-style="solid" style:text-line-through-type="sing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3" office:value-type="string" calcext:value-type="string">
            <text:p>Name</text:p>
          </table:table-cell>
          <table:table-cell table:style-name="ce3"/>
          <table:table-cell table:style-name="ce3" office:value-type="string" calcext:value-type="string">
            <text:p>Cell</text:p>
          </table:table-cell>
          <table:table-cell table:style-name="ce3"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6t1_in_latch</text:p>
          </table:table-cell>
          <table:table-cell/>
          <table:table-cell office:value-type="string" calcext:value-type="string">
            <text:p>sg13g2_IOPadIn</text:p>
          </table:table-cell>
          <table:table-cell/>
          <table:table-cell>
            <draw:frame draw:z-index="0" draw:name="Afbeelding 1" draw:style-name="gr1" draw:text-style-name="P1" svg:width="10.369cm" svg:height="14.319cm" svg:x="0cm" svg:y="0cm">
              <draw:image xlink:href="Pictures/100000010000012600000196A2AFEE6D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Pin numbers are the pin numbers in pad ring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6t1_in_shift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6"/>
          <table:table-cell office:value-type="string" calcext:value-type="string">
            <text:p>The corresponding package pin numbers will need to be added later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6t1_out_l2s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p6t1_out_shift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6"/>
          <table:table-cell office:value-type="string" calcext:value-type="string">
            <text:p>srin net is connected to the in_srin and out_srin signals of all blocks/ports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p6t1_clk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p6t1_out_latch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p6t1_out_srout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p6t1_in_srout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p6t1_vdd</text:p>
          </table:table-cell>
          <table:table-cell/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ovss</text:p>
          </table:table-cell>
          <table:table-cell/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ovdd</text:p>
          </table:table-cell>
          <table:table-cell/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ovss</text:p>
          </table:table-cell>
          <table:table-cell/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p8t1_out_latch2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ovss</text:p>
          </table:table-cell>
          <table:table-cell/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ovdd</text:p>
          </table:table-cell>
          <table:table-cell/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p8t1_out_srout2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p8t1_in_srout2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p8t1_in_latch1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p8t1_in_shift1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p8t1_out_l2s1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dp8t1_clk1</text:p>
          </table:table-cell>
          <table:table-cell office:value-type="string" calcext:value-type="string">
            <text:p>dp8t1_clk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p8t1_out_latch1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p8t1_vdd</text:p>
          </table:table-cell>
          <table:table-cell/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p8t1_out_shift1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p8t1_out_srout1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p8t1_in_srout1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p8t1_in_latch2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p8t1_in_shift2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p8t1_out_l2s2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p8t1_out_shift2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ovdd</text:p>
          </table:table-cell>
          <table:table-cell/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dp8t1_clk2</text:p>
          </table:table-cell>
          <table:table-cell office:value-type="string" calcext:value-type="string">
            <text:p>dp8t1_clk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ovss</text:p>
          </table:table-cell>
          <table:table-cell/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ovdd</text:p>
          </table:table-cell>
          <table:table-cell/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ovss</text:p>
          </table:table-cell>
          <table:table-cell/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rin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p6t3_vdd</text:p>
          </table:table-cell>
          <table:table-cell/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p6t3_in_srout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p6t3_out_srout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p6t3_out_shift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p6t3_out_latch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p6t3_clk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p6t3_out_l2s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p6t3_in_shift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p6t3_in_latch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p6t2_vdd</text:p>
          </table:table-cell>
          <table:table-cell/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p6t2_in_srout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p6t2_out_srout</text:p>
          </table:table-cell>
          <table:table-cell/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p6t2_out_latch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p6t2_clk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p6t2_out_shift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p6t2_out_l2s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p6t2_in_shift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p6t2_in_latch</text:p>
          </table:table-cell>
          <table:table-cell/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ovss</text:p>
          </table:table-cell>
          <table:table-cell/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ovdd</text:p>
          </table:table-cell>
          <table:table-cell/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4:54:22.32708484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f Verhaegen</meta:initial-creator>
    <meta:creation-date>2025-10-02T17:14:37.408008536</meta:creation-date>
    <meta:generator>LibreOffice/24.2.7.2$Linux_X86_64 LibreOffice_project/420$Build-2</meta:generator>
    <dc:date>2025-10-31T14:56:00.713309710</dc:date>
    <dc:creator>Staf Verhaegen</dc:creator>
    <meta:editing-duration>PT20M8S</meta:editing-duration>
    <meta:editing-cycles>4</meta:editing-cycles>
    <meta:document-statistic meta:table-count="1" meta:cell-count="200" meta:object-count="1"/>
  </office:meta>
</office:document-meta>
</file>