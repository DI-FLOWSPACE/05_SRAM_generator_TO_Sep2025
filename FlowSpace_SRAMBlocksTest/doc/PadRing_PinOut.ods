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Pictures/100000010000012600000196A2AFEE6D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004cm"/>
    </style:style>
    <style:style style:name="co3" style:family="table-column">
      <style:table-column-properties fo:break-before="auto" style:column-width="4.149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Blad1" table:style-name="ta1"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column table:style-name="co1" table:number-columns-repeated="16381" table:default-cell-style-name="Default"/>
        <table:table-row table:style-name="ro1">
          <table:table-cell table:style-name="ce1" office:value-type="string" calcext:value-type="string">
            <text:p>Pin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Cell</text:p>
          </table:table-cell>
          <table:table-cell table:style-name="ce3" table:number-columns-repeated="1638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sp6t1_in_latch</text:p>
          </table:table-cell>
          <table:table-cell office:value-type="string" calcext:value-type="string">
            <text:p>sg13g2_IOPadIn</text:p>
          </table:table-cell>
          <table:table-cell/>
          <table:table-cell>
            <draw:frame draw:z-index="0" draw:name="Afbeelding 1" draw:style-name="gr1" draw:text-style-name="P1" svg:width="10.369cm" svg:height="14.319cm" svg:x="0cm" svg:y="0cm">
              <draw:image xlink:href="Pictures/100000010000012600000196A2AFEE6D.png" xlink:type="simple" xlink:show="embed" xlink:actuate="onLoad" draw:mime-type="image/png">
                <text:p/>
              </draw:image>
            </draw:frame>
          </table:table-cell>
          <table:table-cell table:number-columns-repeated="4"/>
          <table:table-cell office:value-type="string" calcext:value-type="string">
            <text:p>Pin numbers are the pin numbers in pad ring</text:p>
          </table:table-cell>
          <table:table-cell table:number-columns-repeated="16374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sp6t1_in_shift</text:p>
          </table:table-cell>
          <table:table-cell office:value-type="string" calcext:value-type="string">
            <text:p>sg13g2_IOPadIn</text:p>
          </table:table-cell>
          <table:table-cell table:number-columns-repeated="6"/>
          <table:table-cell office:value-type="string" calcext:value-type="string">
            <text:p>The corresponding package pin numbers will need to be added later</text:p>
          </table:table-cell>
          <table:table-cell table:number-columns-repeated="16374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sp6t1_out_l2s</text:p>
          </table:table-cell>
          <table:table-cell office:value-type="string" calcext:value-type="string">
            <text:p>sg13g2_IOPadIn</text:p>
          </table:table-cell>
          <table:table-cell table:number-columns-repeated="16381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sp6t1_out_shift</text:p>
          </table:table-cell>
          <table:table-cell office:value-type="string" calcext:value-type="string">
            <text:p>sg13g2_IOPadIn</text:p>
          </table:table-cell>
          <table:table-cell table:number-columns-repeated="6"/>
          <table:table-cell office:value-type="string" calcext:value-type="string">
            <text:p>srin net is connected to the in_srin and out_srin signals of all blocks/ports</text:p>
          </table:table-cell>
          <table:table-cell table:number-columns-repeated="16374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sp6t1_clk</text:p>
          </table:table-cell>
          <table:table-cell office:value-type="string" calcext:value-type="string">
            <text:p>sg13g2_IOPadIn</text:p>
          </table:table-cell>
          <table:table-cell table:number-columns-repeated="16381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sp6t1_out_latch</text:p>
          </table:table-cell>
          <table:table-cell office:value-type="string" calcext:value-type="string">
            <text:p>sg13g2_IOPadIn</text:p>
          </table:table-cell>
          <table:table-cell table:number-columns-repeated="16381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sp6t1_out_srout</text:p>
          </table:table-cell>
          <table:table-cell office:value-type="string" calcext:value-type="string">
            <text:p>sg13g2_IOPadOut30mA</text:p>
          </table:table-cell>
          <table:table-cell table:number-columns-repeated="16381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sp6t1_in_srout</text:p>
          </table:table-cell>
          <table:table-cell office:value-type="string" calcext:value-type="string">
            <text:p>sg13g2_IOPadOut30mA</text:p>
          </table:table-cell>
          <table:table-cell table:number-columns-repeated="16381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sp6t1_vdd</text:p>
          </table:table-cell>
          <table:table-cell office:value-type="string" calcext:value-type="string">
            <text:p>sg13g2_IOPadAnalog</text:p>
          </table:table-cell>
          <table:table-cell table:number-columns-repeated="16381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iovss</text:p>
          </table:table-cell>
          <table:table-cell office:value-type="string" calcext:value-type="string">
            <text:p>sg13g2_IOPadIOVss</text:p>
          </table:table-cell>
          <table:table-cell table:number-columns-repeated="16381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iovdd</text:p>
          </table:table-cell>
          <table:table-cell office:value-type="string" calcext:value-type="string">
            <text:p>sg13g2_IOPadIOVdd</text:p>
          </table:table-cell>
          <table:table-cell table:number-columns-repeated="16381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vss</text:p>
          </table:table-cell>
          <table:table-cell office:value-type="string" calcext:value-type="string">
            <text:p>sg13g2_IOPadVss</text:p>
          </table:table-cell>
          <table:table-cell table:number-columns-repeated="16381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vdd</text:p>
          </table:table-cell>
          <table:table-cell office:value-type="string" calcext:value-type="string">
            <text:p>sg13g2_IOPadVdd</text:p>
          </table:table-cell>
          <table:table-cell table:number-columns-repeated="16381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iovss</text:p>
          </table:table-cell>
          <table:table-cell office:value-type="string" calcext:value-type="string">
            <text:p>sg13g2_IOPadIOVss</text:p>
          </table:table-cell>
          <table:table-cell table:number-columns-repeated="16381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dp8t1_out_latch2</text:p>
          </table:table-cell>
          <table:table-cell office:value-type="string" calcext:value-type="string">
            <text:p>sg13g2_IOPadIn</text:p>
          </table:table-cell>
          <table:table-cell table:number-columns-repeated="16381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iovss</text:p>
          </table:table-cell>
          <table:table-cell office:value-type="string" calcext:value-type="string">
            <text:p>sg13g2_IOPadIOVss</text:p>
          </table:table-cell>
          <table:table-cell table:number-columns-repeated="16381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iovdd</text:p>
          </table:table-cell>
          <table:table-cell office:value-type="string" calcext:value-type="string">
            <text:p>sg13g2_IOPadIOVdd</text:p>
          </table:table-cell>
          <table:table-cell table:number-columns-repeated="16381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dp8t1_out_srout2</text:p>
          </table:table-cell>
          <table:table-cell office:value-type="string" calcext:value-type="string">
            <text:p>sg13g2_IOPadOut30mA</text:p>
          </table:table-cell>
          <table:table-cell table:number-columns-repeated="16381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dp8t1_in_srout2</text:p>
          </table:table-cell>
          <table:table-cell office:value-type="string" calcext:value-type="string">
            <text:p>sg13g2_IOPadOut30mA</text:p>
          </table:table-cell>
          <table:table-cell table:number-columns-repeated="16381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dp8t1_in_latch1</text:p>
          </table:table-cell>
          <table:table-cell office:value-type="string" calcext:value-type="string">
            <text:p>sg13g2_IOPadIn</text:p>
          </table:table-cell>
          <table:table-cell table:number-columns-repeated="16381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dp8t1_in_shift1</text:p>
          </table:table-cell>
          <table:table-cell office:value-type="string" calcext:value-type="string">
            <text:p>sg13g2_IOPadIn</text:p>
          </table:table-cell>
          <table:table-cell table:number-columns-repeated="16381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dp8t1_out_l2s1</text:p>
          </table:table-cell>
          <table:table-cell office:value-type="string" calcext:value-type="string">
            <text:p>sg13g2_IOPadIn</text:p>
          </table:table-cell>
          <table:table-cell table:number-columns-repeated="16381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dp8t1_clk1</text:p>
          </table:table-cell>
          <table:table-cell office:value-type="string" calcext:value-type="string">
            <text:p>sg13g2_IOPadIn</text:p>
          </table:table-cell>
          <table:table-cell table:number-columns-repeated="16381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string" calcext:value-type="string">
            <text:p>dp8t1_out_latch1</text:p>
          </table:table-cell>
          <table:table-cell office:value-type="string" calcext:value-type="string">
            <text:p>sg13g2_IOPadIn</text:p>
          </table:table-cell>
          <table:table-cell table:number-columns-repeated="16381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string" calcext:value-type="string">
            <text:p>dp8t1_vdd</text:p>
          </table:table-cell>
          <table:table-cell office:value-type="string" calcext:value-type="string">
            <text:p>sg13g2_IOPadAnalog</text:p>
          </table:table-cell>
          <table:table-cell table:number-columns-repeated="16381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string" calcext:value-type="string">
            <text:p>dp8t1_out_shift1</text:p>
          </table:table-cell>
          <table:table-cell office:value-type="string" calcext:value-type="string">
            <text:p>sg13g2_IOPadIn</text:p>
          </table:table-cell>
          <table:table-cell table:number-columns-repeated="16381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string" calcext:value-type="string">
            <text:p>dp8t1_out_srout1</text:p>
          </table:table-cell>
          <table:table-cell office:value-type="string" calcext:value-type="string">
            <text:p>sg13g2_IOPadOut30mA</text:p>
          </table:table-cell>
          <table:table-cell table:number-columns-repeated="16381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string" calcext:value-type="string">
            <text:p>dp8t1_in_srout1</text:p>
          </table:table-cell>
          <table:table-cell office:value-type="string" calcext:value-type="string">
            <text:p>sg13g2_IOPadOut30mA</text:p>
          </table:table-cell>
          <table:table-cell table:number-columns-repeated="16381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string" calcext:value-type="string">
            <text:p>dp8t1_in_latch2</text:p>
          </table:table-cell>
          <table:table-cell office:value-type="string" calcext:value-type="string">
            <text:p>sg13g2_IOPadIn</text:p>
          </table:table-cell>
          <table:table-cell table:number-columns-repeated="16381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string" calcext:value-type="string">
            <text:p>dp8t1_in_shift2</text:p>
          </table:table-cell>
          <table:table-cell office:value-type="string" calcext:value-type="string">
            <text:p>sg13g2_IOPadIn</text:p>
          </table:table-cell>
          <table:table-cell table:number-columns-repeated="16381"/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string" calcext:value-type="string">
            <text:p>dp8t1_out_l2s2</text:p>
          </table:table-cell>
          <table:table-cell office:value-type="string" calcext:value-type="string">
            <text:p>sg13g2_IOPadIn</text:p>
          </table:table-cell>
          <table:table-cell table:number-columns-repeated="16381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dp8t1_out_shift2</text:p>
          </table:table-cell>
          <table:table-cell office:value-type="string" calcext:value-type="string">
            <text:p>sg13g2_IOPadIn</text:p>
          </table:table-cell>
          <table:table-cell table:number-columns-repeated="16381"/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string" calcext:value-type="string">
            <text:p>iovdd</text:p>
          </table:table-cell>
          <table:table-cell office:value-type="string" calcext:value-type="string">
            <text:p>sg13g2_IOPadIOVdd</text:p>
          </table:table-cell>
          <table:table-cell table:number-columns-repeated="16381"/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string" calcext:value-type="string">
            <text:p>dp8t1_clk2</text:p>
          </table:table-cell>
          <table:table-cell office:value-type="string" calcext:value-type="string">
            <text:p>sg13g2_IOPadIn</text:p>
          </table:table-cell>
          <table:table-cell table:number-columns-repeated="16381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string" calcext:value-type="string">
            <text:p>iovss</text:p>
          </table:table-cell>
          <table:table-cell office:value-type="string" calcext:value-type="string">
            <text:p>sg13g2_IOPadIOVss</text:p>
          </table:table-cell>
          <table:table-cell table:number-columns-repeated="16381"/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string" calcext:value-type="string">
            <text:p>vdd</text:p>
          </table:table-cell>
          <table:table-cell office:value-type="string" calcext:value-type="string">
            <text:p>sg13g2_IOPadVdd</text:p>
          </table:table-cell>
          <table:table-cell table:number-columns-repeated="16381"/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string" calcext:value-type="string">
            <text:p>vss</text:p>
          </table:table-cell>
          <table:table-cell office:value-type="string" calcext:value-type="string">
            <text:p>sg13g2_IOPadVss</text:p>
          </table:table-cell>
          <table:table-cell table:number-columns-repeated="16381"/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string" calcext:value-type="string">
            <text:p>vdd</text:p>
          </table:table-cell>
          <table:table-cell office:value-type="string" calcext:value-type="string">
            <text:p>sg13g2_IOPadVdd</text:p>
          </table:table-cell>
          <table:table-cell table:number-columns-repeated="16381"/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string" calcext:value-type="string">
            <text:p>vss</text:p>
          </table:table-cell>
          <table:table-cell office:value-type="string" calcext:value-type="string">
            <text:p>sg13g2_IOPadVss</text:p>
          </table:table-cell>
          <table:table-cell table:number-columns-repeated="16381"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string" calcext:value-type="string">
            <text:p>iovdd</text:p>
          </table:table-cell>
          <table:table-cell office:value-type="string" calcext:value-type="string">
            <text:p>sg13g2_IOPadIOVdd</text:p>
          </table:table-cell>
          <table:table-cell table:number-columns-repeated="16381"/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string" calcext:value-type="string">
            <text:p>iovss</text:p>
          </table:table-cell>
          <table:table-cell office:value-type="string" calcext:value-type="string">
            <text:p>sg13g2_IOPadIOVss</text:p>
          </table:table-cell>
          <table:table-cell table:number-columns-repeated="16381"/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string" calcext:value-type="string">
            <text:p>srin</text:p>
          </table:table-cell>
          <table:table-cell office:value-type="string" calcext:value-type="string">
            <text:p>sg13g2_IOPadIn</text:p>
          </table:table-cell>
          <table:table-cell table:number-columns-repeated="16381"/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string" calcext:value-type="string">
            <text:p>sp6t3_vdd</text:p>
          </table:table-cell>
          <table:table-cell office:value-type="string" calcext:value-type="string">
            <text:p>sg13g2_IOPadAnalog</text:p>
          </table:table-cell>
          <table:table-cell table:number-columns-repeated="16381"/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string" calcext:value-type="string">
            <text:p>sp6t3_in_srout</text:p>
          </table:table-cell>
          <table:table-cell office:value-type="string" calcext:value-type="string">
            <text:p>sg13g2_IOPadOut30mA</text:p>
          </table:table-cell>
          <table:table-cell table:number-columns-repeated="16381"/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string" calcext:value-type="string">
            <text:p>sp6t3_out_srout</text:p>
          </table:table-cell>
          <table:table-cell office:value-type="string" calcext:value-type="string">
            <text:p>sg13g2_IOPadOut30mA</text:p>
          </table:table-cell>
          <table:table-cell table:number-columns-repeated="16381"/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string" calcext:value-type="string">
            <text:p>sp6t3_out_shift</text:p>
          </table:table-cell>
          <table:table-cell office:value-type="string" calcext:value-type="string">
            <text:p>sg13g2_IOPadIn</text:p>
          </table:table-cell>
          <table:table-cell table:number-columns-repeated="16381"/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string" calcext:value-type="string">
            <text:p>sp6t3_out_latch</text:p>
          </table:table-cell>
          <table:table-cell office:value-type="string" calcext:value-type="string">
            <text:p>sg13g2_IOPadIn</text:p>
          </table:table-cell>
          <table:table-cell table:number-columns-repeated="16381"/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string" calcext:value-type="string">
            <text:p>sp6t3_clk</text:p>
          </table:table-cell>
          <table:table-cell office:value-type="string" calcext:value-type="string">
            <text:p>sg13g2_IOPadIn</text:p>
          </table:table-cell>
          <table:table-cell table:number-columns-repeated="16381"/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string" calcext:value-type="string">
            <text:p>sp6t3_out_l2s</text:p>
          </table:table-cell>
          <table:table-cell office:value-type="string" calcext:value-type="string">
            <text:p>sg13g2_IOPadIn</text:p>
          </table:table-cell>
          <table:table-cell table:number-columns-repeated="16381"/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string" calcext:value-type="string">
            <text:p>sp6t3_in_shift</text:p>
          </table:table-cell>
          <table:table-cell office:value-type="string" calcext:value-type="string">
            <text:p>sg13g2_IOPadIn</text:p>
          </table:table-cell>
          <table:table-cell table:number-columns-repeated="16381"/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string" calcext:value-type="string">
            <text:p>sp6t3_in_latch</text:p>
          </table:table-cell>
          <table:table-cell office:value-type="string" calcext:value-type="string">
            <text:p>sg13g2_IOPadIn</text:p>
          </table:table-cell>
          <table:table-cell table:number-columns-repeated="16381"/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string" calcext:value-type="string">
            <text:p>vss</text:p>
          </table:table-cell>
          <table:table-cell office:value-type="string" calcext:value-type="string">
            <text:p>sg13g2_IOPadVss</text:p>
          </table:table-cell>
          <table:table-cell table:number-columns-repeated="16381"/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string" calcext:value-type="string">
            <text:p>vdd</text:p>
          </table:table-cell>
          <table:table-cell office:value-type="string" calcext:value-type="string">
            <text:p>sg13g2_IOPadVdd</text:p>
          </table:table-cell>
          <table:table-cell table:number-columns-repeated="16381"/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string" calcext:value-type="string">
            <text:p>sp6t2_vdd</text:p>
          </table:table-cell>
          <table:table-cell office:value-type="string" calcext:value-type="string">
            <text:p>sg13g2_IOPadAnalog</text:p>
          </table:table-cell>
          <table:table-cell table:number-columns-repeated="16381"/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string" calcext:value-type="string">
            <text:p>sp6t2_in_srout</text:p>
          </table:table-cell>
          <table:table-cell office:value-type="string" calcext:value-type="string">
            <text:p>sg13g2_IOPadOut30mA</text:p>
          </table:table-cell>
          <table:table-cell table:number-columns-repeated="16381"/>
        </table:table-row>
        <table:table-row table:style-name="ro2">
          <table:table-cell office:value-type="float" office:value="56" calcext:value-type="float">
            <text:p>56</text:p>
          </table:table-cell>
          <table:table-cell office:value-type="string" calcext:value-type="string">
            <text:p>sp6t2_out_srout</text:p>
          </table:table-cell>
          <table:table-cell office:value-type="string" calcext:value-type="string">
            <text:p>sg13g2_IOPadOut30mA</text:p>
          </table:table-cell>
          <table:table-cell table:number-columns-repeated="16381"/>
        </table:table-row>
        <table:table-row table:style-name="ro2">
          <table:table-cell office:value-type="float" office:value="57" calcext:value-type="float">
            <text:p>57</text:p>
          </table:table-cell>
          <table:table-cell office:value-type="string" calcext:value-type="string">
            <text:p>sp6t2_out_latch</text:p>
          </table:table-cell>
          <table:table-cell office:value-type="string" calcext:value-type="string">
            <text:p>sg13g2_IOPadIn</text:p>
          </table:table-cell>
          <table:table-cell table:number-columns-repeated="16381"/>
        </table:table-row>
        <table:table-row table:style-name="ro2">
          <table:table-cell office:value-type="float" office:value="58" calcext:value-type="float">
            <text:p>58</text:p>
          </table:table-cell>
          <table:table-cell office:value-type="string" calcext:value-type="string">
            <text:p>sp6t2_clk</text:p>
          </table:table-cell>
          <table:table-cell office:value-type="string" calcext:value-type="string">
            <text:p>sg13g2_IOPadIn</text:p>
          </table:table-cell>
          <table:table-cell table:number-columns-repeated="16381"/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string" calcext:value-type="string">
            <text:p>sp6t2_out_shift</text:p>
          </table:table-cell>
          <table:table-cell office:value-type="string" calcext:value-type="string">
            <text:p>sg13g2_IOPadIn</text:p>
          </table:table-cell>
          <table:table-cell table:number-columns-repeated="16381"/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string" calcext:value-type="string">
            <text:p>sp6t2_out_l2s</text:p>
          </table:table-cell>
          <table:table-cell office:value-type="string" calcext:value-type="string">
            <text:p>sg13g2_IOPadIn</text:p>
          </table:table-cell>
          <table:table-cell table:number-columns-repeated="16381"/>
        </table:table-row>
        <table:table-row table:style-name="ro2">
          <table:table-cell office:value-type="float" office:value="61" calcext:value-type="float">
            <text:p>61</text:p>
          </table:table-cell>
          <table:table-cell office:value-type="string" calcext:value-type="string">
            <text:p>sp6t2_in_shift</text:p>
          </table:table-cell>
          <table:table-cell office:value-type="string" calcext:value-type="string">
            <text:p>sg13g2_IOPadIn</text:p>
          </table:table-cell>
          <table:table-cell table:number-columns-repeated="16381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sp6t2_in_latch</text:p>
          </table:table-cell>
          <table:table-cell office:value-type="string" calcext:value-type="string">
            <text:p>sg13g2_IOPadIn</text:p>
          </table:table-cell>
          <table:table-cell table:number-columns-repeated="16381"/>
        </table:table-row>
        <table:table-row table:style-name="ro2">
          <table:table-cell office:value-type="float" office:value="63" calcext:value-type="float">
            <text:p>63</text:p>
          </table:table-cell>
          <table:table-cell office:value-type="string" calcext:value-type="string">
            <text:p>iovss</text:p>
          </table:table-cell>
          <table:table-cell office:value-type="string" calcext:value-type="string">
            <text:p>sg13g2_IOPadIOVss</text:p>
          </table:table-cell>
          <table:table-cell table:number-columns-repeated="16381"/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string" calcext:value-type="string">
            <text:p>iovdd</text:p>
          </table:table-cell>
          <table:table-cell office:value-type="string" calcext:value-type="string">
            <text:p>sg13g2_IOPadIOVdd</text:p>
          </table:table-cell>
          <table:table-cell table:number-columns-repeated="16381"/>
        </table:table-row>
        <table:table-row table:style-name="ro2" table:number-rows-repeated="1048510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nl" fo:country="NL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nl" fo:country="NL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ijlpunt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ijlpunten_20_1" draw:display-name="Pijlpunt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03">00/00/0000</text:date>, <text:time>00:00:00</text:time></text:p>
        </style:region-right>
      </style:header>
      <style:header-left style:display="false"/>
      <style:header-first style:display="false"/>
      <style:footer>
        <text:p>Pa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Staf Verhaegen</meta:initial-creator>
    <meta:creation-date>2025-10-02T17:14:37.408008536</meta:creation-date>
    <meta:generator>LibreOffice/24.2.7.2$Linux_X86_64 LibreOffice_project/420$Build-2</meta:generator>
    <dc:date>2025-10-03T09:51:07.135269782</dc:date>
    <dc:creator>Staf Verhaegen</dc:creator>
    <meta:editing-duration>PT18M30S</meta:editing-duration>
    <meta:editing-cycles>3</meta:editing-cycles>
    <meta:document-statistic meta:table-count="1" meta:cell-count="198" meta:object-count="1"/>
  </office:meta>
</office:document-meta>
</file>